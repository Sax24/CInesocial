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0c0421" officeooo:paragraph-rsid="000c0421"/>
    </style:style>
    <style:style style:name="P2" style:family="paragraph" style:parent-style-name="Standard">
      <style:text-properties officeooo:rsid="000c0421" officeooo:paragraph-rsid="000c339b"/>
    </style:style>
    <style:style style:name="P3" style:family="paragraph" style:parent-style-name="Standard">
      <style:text-properties officeooo:rsid="000c339b" officeooo:paragraph-rsid="000c339b"/>
    </style:style>
    <style:style style:name="P4" style:family="paragraph" style:parent-style-name="Standard">
      <style:text-properties officeooo:paragraph-rsid="000c339b"/>
    </style:style>
    <style:style style:name="T1" style:family="text">
      <style:text-properties officeooo:rsid="000c339b"/>
    </style:style>
    <style:style style:name="T2" style:family="text">
      <style:text-properties style:font-name="Liberation Serif"/>
    </style:style>
    <style:style style:name="T3" style:family="text">
      <style:text-properties style:font-name="Liberation Serif" officeooo:rsid="000c339b"/>
    </style:style>
    <style:style style:name="T4" style:family="text">
      <style:text-properties officeooo:rsid="000ddb0d"/>
    </style:style>
    <style:style style:name="T5" style:family="text">
      <style:text-properties officeooo:rsid="000fd04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om de l’application : CinéSocial<text:line-break/>CinéSocial est une application web sociale dédiée au cinéma. Après avoir créé un profil et s'être authentifié, chaque utilisateur peut rechercher des films, les noter, laisser des commentaires et consulter ceux des autres membres de la communauté. Il peut également constituer sa propre watchlist en y ajoutant les films qu'il souhaite voir,</text:p>
      <text:p text:style-name="P1"/>
      <text:p text:style-name="P3">API web :</text:p>
      <text:p text:style-name="P4"><text:span text:style-name="T1">L'application s'appuie sur </text:span><text:span text:style-name="Strong_20_Emphasis"><text:span text:style-name="T1">The Movie Database API (TMDB)</text:span></text:span><text:span text:style-name="T1">, une API REST publique et gratuite accessible à l'adresse </text:span><text:span text:style-name="Source_20_Text"><text:span text:style-name="T3">https://api.themoviedb.org/3</text:span></text:span><text:span text:style-name="T1">. Cette API propose une base de données cinématographique très riche et mise à jour quotidiennement, incluant les films actuellement en salle, les sorties à venir, les tendances du moment, les détails de chaque film (synopsis, date de sortie, genres, note moyenne, durée), ainsi que les affiches et images associées.</text:span>Son contenu est dynamique car les tendances et les sorties évoluent chaque jour. Dans le cadre de CinéSocial, l'API est interrogée à la demande lorsqu'un utilisateur effectue une recherche ou consulte l'accueil, mais aussi de manière planifiée chaque soir afin de maintenir le catalogue des nouvelles sorties à jour.</text:p>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9T13:04:33.667564183</meta:creation-date>
    <dc:date>2026-03-19T13:31:59.401631932</dc:date>
    <meta:editing-duration>PT16M54S</meta:editing-duration>
    <meta:editing-cycles>5</meta:editing-cycles>
    <meta:generator>LibreOffice/7.3.7.2$Linux_X86_64 LibreOffice_project/30$Build-2</meta:generator>
    <meta:document-statistic meta:table-count="0" meta:image-count="0" meta:object-count="0" meta:page-count="1" meta:paragraph-count="3" meta:word-count="175" meta:character-count="1159" meta:non-whitespace-character-count="987"/>
  </office:meta>
</office:document-meta>
</file>